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e212" officeooo:paragraph-rsid="001be212"/>
    </style:style>
    <style:style style:name="P2" style:family="paragraph" style:parent-style-name="Standard">
      <style:paragraph-properties fo:text-align="center" style:justify-single-word="false"/>
      <style:text-properties officeooo:rsid="001be212" officeooo:paragraph-rsid="001be212"/>
    </style:style>
    <style:style style:name="P3" style:family="paragraph" style:parent-style-name="Standard">
      <style:paragraph-properties fo:text-align="center" style:justify-single-word="false"/>
      <style:text-properties fo:font-weight="bold" officeooo:rsid="001be212" officeooo:paragraph-rsid="001be212" style:font-weight-asian="bold" style:font-weight-complex="bold"/>
    </style:style>
    <style:style style:name="P4" style:family="paragraph" style:parent-style-name="Standard">
      <style:text-properties fo:font-weight="bold" officeooo:rsid="00393613" officeooo:paragraph-rsid="00393613" style:font-weight-asian="bold" style:font-weight-complex="bold"/>
    </style:style>
    <style:style style:name="P5" style:family="paragraph" style:parent-style-name="Standard">
      <style:text-properties officeooo:rsid="001ebc9b" officeooo:paragraph-rsid="001ebc9b"/>
    </style:style>
    <style:style style:name="P6" style:family="paragraph" style:parent-style-name="Standard">
      <style:text-properties officeooo:rsid="001ebc9b" officeooo:paragraph-rsid="0023dbe4"/>
    </style:style>
    <style:style style:name="P7" style:family="paragraph" style:parent-style-name="Standard">
      <style:text-properties officeooo:rsid="001ebc9b" officeooo:paragraph-rsid="0027d344"/>
    </style:style>
    <style:style style:name="P8" style:family="paragraph" style:parent-style-name="Standard">
      <style:text-properties officeooo:rsid="001ff5eb" officeooo:paragraph-rsid="001ff5eb"/>
    </style:style>
    <style:style style:name="P9" style:family="paragraph" style:parent-style-name="Standard">
      <style:text-properties officeooo:paragraph-rsid="001ebc9b"/>
    </style:style>
    <style:style style:name="P10" style:family="paragraph" style:parent-style-name="Standard">
      <style:text-properties officeooo:paragraph-rsid="0020f60d"/>
    </style:style>
    <style:style style:name="P11" style:family="paragraph" style:parent-style-name="Standard">
      <style:text-properties officeooo:paragraph-rsid="0023dbe4"/>
    </style:style>
    <style:style style:name="P12" style:family="paragraph" style:parent-style-name="Standard">
      <style:text-properties officeooo:paragraph-rsid="0027d344"/>
    </style:style>
    <style:style style:name="P13" style:family="paragraph" style:parent-style-name="Standard">
      <style:text-properties officeooo:paragraph-rsid="001ff5eb"/>
    </style:style>
    <style:style style:name="P14" style:family="paragraph" style:parent-style-name="Standard">
      <style:text-properties officeooo:paragraph-rsid="002a3af5"/>
    </style:style>
    <style:style style:name="P15" style:family="paragraph" style:parent-style-name="Standard">
      <style:text-properties officeooo:rsid="002b2c02" officeooo:paragraph-rsid="002b2c02"/>
    </style:style>
    <style:style style:name="P16" style:family="paragraph" style:parent-style-name="Standard">
      <style:text-properties officeooo:rsid="002b2c02" officeooo:paragraph-rsid="002b5546"/>
    </style:style>
    <style:style style:name="P17" style:family="paragraph" style:parent-style-name="Standard">
      <style:text-properties officeooo:paragraph-rsid="002b5546"/>
    </style:style>
    <style:style style:name="P18" style:family="paragraph" style:parent-style-name="Standard">
      <style:text-properties officeooo:rsid="002c1a52" officeooo:paragraph-rsid="002c1a52"/>
    </style:style>
    <style:style style:name="P19" style:family="paragraph" style:parent-style-name="Standard">
      <style:text-properties officeooo:rsid="002c1a52" officeooo:paragraph-rsid="003cda28"/>
    </style:style>
    <style:style style:name="P20" style:family="paragraph" style:parent-style-name="Standard">
      <style:text-properties officeooo:rsid="00393613" officeooo:paragraph-rsid="00393613"/>
    </style:style>
    <style:style style:name="P21" style:family="paragraph" style:parent-style-name="Standard">
      <style:text-properties officeooo:rsid="003efff6" officeooo:paragraph-rsid="003efff6"/>
    </style:style>
    <style:style style:name="P22" style:family="paragraph" style:parent-style-name="Standard">
      <style:text-properties officeooo:rsid="004bb7d2" officeooo:paragraph-rsid="004bb7d2"/>
    </style:style>
    <style:style style:name="P23" style:family="paragraph" style:parent-style-name="Standard">
      <style:text-properties officeooo:rsid="004d3424" officeooo:paragraph-rsid="004d3424"/>
    </style:style>
    <style:style style:name="P24" style:family="paragraph" style:parent-style-name="Standard">
      <style:text-properties officeooo:rsid="007372d8" officeooo:paragraph-rsid="007372d8"/>
    </style:style>
    <style:style style:name="P25" style:family="paragraph" style:parent-style-name="Standard">
      <style:text-properties officeooo:rsid="00770799" officeooo:paragraph-rsid="00770799"/>
    </style:style>
    <style:style style:name="P26" style:family="paragraph" style:parent-style-name="Standard">
      <style:text-properties officeooo:rsid="00792503" officeooo:paragraph-rsid="00792503"/>
    </style:style>
    <style:style style:name="P27" style:family="paragraph" style:parent-style-name="Standard">
      <style:text-properties officeooo:rsid="0098b0f0" officeooo:paragraph-rsid="0098b0f0"/>
    </style:style>
    <style:style style:name="P28" style:family="paragraph" style:parent-style-name="Standard" style:list-style-name="L1">
      <style:text-properties officeooo:rsid="006322c8" officeooo:paragraph-rsid="006322c8"/>
    </style:style>
    <style:style style:name="P29" style:family="paragraph" style:parent-style-name="Standard" style:list-style-name="L3">
      <style:text-properties officeooo:rsid="002b2c02" officeooo:paragraph-rsid="002b2c02"/>
    </style:style>
    <style:style style:name="P30" style:family="paragraph" style:parent-style-name="Standard" style:list-style-name="L4">
      <style:text-properties officeooo:rsid="003cda28" officeooo:paragraph-rsid="003cda28"/>
    </style:style>
    <style:style style:name="P31" style:family="paragraph" style:parent-style-name="Standard" style:list-style-name="L4">
      <style:text-properties officeooo:rsid="002c1a52" officeooo:paragraph-rsid="002c1a52"/>
    </style:style>
    <style:style style:name="P32" style:family="paragraph" style:parent-style-name="Standard" style:list-style-name="L5">
      <style:text-properties officeooo:rsid="003efff6" officeooo:paragraph-rsid="003efff6"/>
    </style:style>
    <style:style style:name="P33" style:family="paragraph" style:parent-style-name="Text_20_body" style:list-style-name="L2"/>
    <style:style style:name="P34" style:family="paragraph" style:parent-style-name="Text_20_body" style:list-style-name="L2">
      <style:paragraph-properties fo:margin-top="0in" fo:margin-bottom="0in" style:contextual-spacing="false"/>
    </style:style>
    <style:style style:name="T1" style:family="text">
      <style:text-properties officeooo:rsid="001c83ff"/>
    </style:style>
    <style:style style:name="T2" style:family="text">
      <style:text-properties fo:font-weight="bold" style:font-weight-asian="bold" style:font-weight-complex="bold"/>
    </style:style>
    <style:style style:name="T3" style:family="text">
      <style:text-properties fo:font-weight="bold" officeooo:rsid="001ebc9b" style:font-weight-asian="bold" style:font-weight-complex="bold"/>
    </style:style>
    <style:style style:name="T4" style:family="text">
      <style:text-properties fo:font-weight="bold" officeooo:rsid="001ff5eb" style:font-weight-asian="bold" style:font-weight-complex="bold"/>
    </style:style>
    <style:style style:name="T5" style:family="text">
      <style:text-properties fo:font-weight="bold" officeooo:rsid="002b2c02" style:font-weight-asian="bold" style:font-weight-complex="bold"/>
    </style:style>
    <style:style style:name="T6" style:family="text">
      <style:text-properties fo:font-weight="bold" officeooo:rsid="00417f31" style:font-weight-asian="bold" style:font-weight-complex="bold"/>
    </style:style>
    <style:style style:name="T7" style:family="text">
      <style:text-properties fo:font-weight="bold" officeooo:rsid="0066f0cd" style:font-weight-asian="bold" style:font-weight-complex="bold"/>
    </style:style>
    <style:style style:name="T8" style:family="text">
      <style:text-properties officeooo:rsid="001ce2a5"/>
    </style:style>
    <style:style style:name="T9" style:family="text">
      <style:text-properties officeooo:rsid="001ebc9b"/>
    </style:style>
    <style:style style:name="T10" style:family="text">
      <style:text-properties officeooo:rsid="0020f60d"/>
    </style:style>
    <style:style style:name="T11" style:family="text">
      <style:text-properties officeooo:rsid="0021edd5"/>
    </style:style>
    <style:style style:name="T12" style:family="text">
      <style:text-properties officeooo:rsid="0023dbe4"/>
    </style:style>
    <style:style style:name="T13" style:family="text">
      <style:text-properties officeooo:rsid="0024e221"/>
    </style:style>
    <style:style style:name="T14" style:family="text">
      <style:text-properties officeooo:rsid="0027d344"/>
    </style:style>
    <style:style style:name="T15" style:family="text">
      <style:text-properties officeooo:rsid="002a3af5"/>
    </style:style>
    <style:style style:name="T16" style:family="text">
      <style:text-properties officeooo:rsid="002b2c02"/>
    </style:style>
    <style:style style:name="T17" style:family="text">
      <style:text-properties fo:font-weight="normal" style:font-weight-asian="normal" style:font-weight-complex="normal"/>
    </style:style>
    <style:style style:name="T18" style:family="text">
      <style:text-properties fo:font-weight="normal" officeooo:rsid="00417f31" style:font-weight-asian="normal" style:font-weight-complex="normal"/>
    </style:style>
    <style:style style:name="T19" style:family="text">
      <style:text-properties officeooo:rsid="0030cb3d"/>
    </style:style>
    <style:style style:name="T20" style:family="text">
      <style:text-properties officeooo:rsid="00328e38"/>
    </style:style>
    <style:style style:name="T21" style:family="text">
      <style:text-properties officeooo:rsid="0033fb28"/>
    </style:style>
    <style:style style:name="T22" style:family="text">
      <style:text-properties officeooo:rsid="003b5445"/>
    </style:style>
    <style:style style:name="T23" style:family="text">
      <style:text-properties officeooo:rsid="003cda28"/>
    </style:style>
    <style:style style:name="T24" style:family="text">
      <style:text-properties officeooo:rsid="00417f31"/>
    </style:style>
    <style:style style:name="T25" style:family="text">
      <style:text-properties officeooo:rsid="00457bbe"/>
    </style:style>
    <style:style style:name="T26" style:family="text">
      <style:text-properties officeooo:rsid="0046c480"/>
    </style:style>
    <style:style style:name="T27" style:family="text">
      <style:text-properties officeooo:rsid="004a3621"/>
    </style:style>
    <style:style style:name="T28" style:family="text">
      <style:text-properties officeooo:rsid="004e97bd"/>
    </style:style>
    <style:style style:name="T29" style:family="text">
      <style:text-properties officeooo:rsid="00500f09"/>
    </style:style>
    <style:style style:name="T30" style:family="text">
      <style:text-properties officeooo:rsid="00505fa8"/>
    </style:style>
    <style:style style:name="T31" style:family="text">
      <style:text-properties officeooo:rsid="0050f76a"/>
    </style:style>
    <style:style style:name="T32" style:family="text">
      <style:text-properties officeooo:rsid="005254d1"/>
    </style:style>
    <style:style style:name="T33" style:family="text">
      <style:text-properties officeooo:rsid="00532ad2"/>
    </style:style>
    <style:style style:name="T34" style:family="text">
      <style:text-properties officeooo:rsid="005394cf"/>
    </style:style>
    <style:style style:name="T35" style:family="text">
      <style:text-properties officeooo:rsid="005766c9"/>
    </style:style>
    <style:style style:name="T36" style:family="text">
      <style:text-properties officeooo:rsid="0058b9b5"/>
    </style:style>
    <style:style style:name="T37" style:family="text">
      <style:text-properties officeooo:rsid="005a6f14"/>
    </style:style>
    <style:style style:name="T38" style:family="text">
      <style:text-properties officeooo:rsid="005d7071"/>
    </style:style>
    <style:style style:name="T39" style:family="text">
      <style:text-properties officeooo:rsid="005f41d1"/>
    </style:style>
    <style:style style:name="T40" style:family="text">
      <style:text-properties officeooo:rsid="00608420"/>
    </style:style>
    <style:style style:name="T41" style:family="text">
      <style:text-properties officeooo:rsid="006322c8"/>
    </style:style>
    <style:style style:name="T42" style:family="text">
      <style:text-properties officeooo:rsid="0064b7b6"/>
    </style:style>
    <style:style style:name="T43" style:family="text">
      <style:text-properties officeooo:rsid="0064eadb"/>
    </style:style>
    <style:style style:name="T44" style:family="text">
      <style:text-properties officeooo:rsid="006f56ae"/>
    </style:style>
    <style:style style:name="T45" style:family="text">
      <style:text-properties officeooo:rsid="00725d28"/>
    </style:style>
    <style:style style:name="T46" style:family="text">
      <style:text-properties officeooo:rsid="007437c0"/>
    </style:style>
    <style:style style:name="T47" style:family="text">
      <style:text-properties officeooo:rsid="007633f1"/>
    </style:style>
    <style:style style:name="T48" style:family="text">
      <style:text-properties officeooo:rsid="007639fb"/>
    </style:style>
    <style:style style:name="T49" style:family="text">
      <style:text-properties officeooo:rsid="00767395"/>
    </style:style>
    <style:style style:name="T50" style:family="text">
      <style:text-properties officeooo:rsid="0076942c"/>
    </style:style>
    <style:style style:name="T51" style:family="text">
      <style:text-properties officeooo:rsid="007af491"/>
    </style:style>
    <style:style style:name="T52" style:family="text">
      <style:text-properties officeooo:rsid="007bd622"/>
    </style:style>
    <style:style style:name="T53" style:family="text">
      <style:text-properties officeooo:rsid="007f4101"/>
    </style:style>
    <style:style style:name="T54" style:family="text">
      <style:text-properties officeooo:rsid="0081711b"/>
    </style:style>
    <style:style style:name="T55" style:family="text">
      <style:text-properties officeooo:rsid="00851bb9"/>
    </style:style>
    <style:style style:name="T56" style:family="text">
      <style:text-properties officeooo:rsid="0088dc38"/>
    </style:style>
    <style:style style:name="T57" style:family="text">
      <style:text-properties officeooo:rsid="008b7d37"/>
    </style:style>
    <style:style style:name="T58" style:family="text">
      <style:text-properties officeooo:rsid="008cd52d"/>
    </style:style>
    <style:style style:name="T59" style:family="text">
      <style:text-properties officeooo:rsid="008df667"/>
    </style:style>
    <style:style style:name="T60" style:family="text">
      <style:text-properties officeooo:rsid="00932e9a"/>
    </style:style>
    <style:style style:name="T61" style:family="text">
      <style:text-properties officeooo:rsid="0098e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sign Verification Methods</text:p>
      <text:p text:style-name="P2">Timothy P Woodard</text:p>
      <text:p text:style-name="P2">Dec 29, 2025</text:p>
      <text:p text:style-name="P1"/>
      <text:p text:style-name="P1"><text:span text:style-name="T2">Overview: </text:span>Design verification is the process of confirming that <text:span text:style-name="T1">the </text:span>design <text:span text:style-name="T1">meets the requirements and was built correctly according to its specifications. To accomplish verification, one or more verification methods </text:span><text:span text:style-name="T8">are used</text:span><text:span text:style-name="T1">, chosen based on the requirement type, risk, cost, and feasibility. </text:span><text:span text:style-name="T24">The basic verification methods are: </text:span><text:span text:style-name="T6">analysis</text:span><text:span text:style-name="T18">,</text:span><text:span text:style-name="T6"> test</text:span><text:span text:style-name="T18">,</text:span><text:span text:style-name="T6"> inspection</text:span><text:span text:style-name="T18">,</text:span><text:span text:style-name="T6"> demonstration</text:span><text:span text:style-name="T18">,</text:span><text:span text:style-name="T6"> similarity</text:span><text:span text:style-name="T24">, and </text:span><text:span text:style-name="T6">lot controls</text:span><text:span text:style-name="T24">. </text:span><text:span text:style-name="T19">Typical requirement types include: functional, feature, performance, interface, environmental, and design requirements. </text:span><text:span text:style-name="T27">The requirements should be provided in an item or system specification which also identifies the proper verification method. </text:span><text:span text:style-name="T20">A requirements verification matrix (RVM) may be used to summarize the requirement information including: requirement identification, origin, text, phase of verification, verification method, pass / fail criteria, etc. </text:span><text:span text:style-name="T21">A design verification plan and report (DVP&amp;R) is a document which provides details on the verification plan and results.</text:span></text:p>
      <text:p text:style-name="P1"/>
      <text:p text:style-name="P22"><text:span text:style-name="T2">Qualification versus Acceptance: </text:span><text:span text:style-name="T28">Qualification tests establish margin for the design and may consume the test article (static load tests to failure or life tests). Acceptance tests ensure the end-item was built correctly with no flaws / </text:span><text:span text:style-name="T31">defects</text:span><text:span text:style-name="T28"> and meets all performance requir</text:span><text:span text:style-name="T29">e</text:span><text:span text:style-name="T28">ments </text:span><text:span text:style-name="T29">(workmanship)</text:span><text:span text:style-name="T28">. </text:span><text:span text:style-name="T30">It is expected the qualification unit(s) will see all tests to a higher level to establish margin. This also provides opportunity to refine and validate the verification plan. Delivered items undergo acceptance testing, which can be a limited set of verification events to ensure quality.</text:span></text:p>
      <text:p text:style-name="P22"/>
      <text:p text:style-name="P23"><text:span text:style-name="T2">Verification versus Validation:</text:span> Verification checks whether a product meets its specified <text:span text:style-name="T2">requirements</text:span> and is “built right”. Validation checks whether the product fulfills its <text:span text:style-name="T2">intended purpose</text:span> and ensures the “right product is built”.</text:p>
      <text:p text:style-name="P1"/>
      <text:p text:style-name="P9"><text:span text:style-name="T3">Analysis:</text:span><text:span text:style-name="T9"> </text:span>Verification through mathematical models, simulations, calculations, or theoretical evaluation. Analysis is fast and cost‑effective, and it supports early design decisions before prototypes exist. <text:span text:style-name="T11">Used w</text:span>hen physical testing is impractical, expensive, or unnecessary <text:span text:style-name="T11">and e</text:span>arly in development to predict performance.</text:p>
      <text:p text:style-name="P9"/>
      <text:p text:style-name="P10"><text:span text:style-name="T10">Examples: </text:span><text:span text:style-name="T25">f</text:span>inite element analysis (FEA), <text:span text:style-name="T25">c</text:span>omputational fluid dynamics (CFD), <text:span text:style-name="T25">t</text:span>olerance stack‑ups, <text:span text:style-name="T25">s</text:span>tress/strain calculations, <text:span text:style-name="T25">dynamic simulations, kinematic analysis, </text:span><text:span text:style-name="T26">etc.</text:span></text:p>
      <text:p text:style-name="P5"/>
      <text:p text:style-name="P9"><text:span text:style-name="T3">Demonstration: </text:span>Verification by showing that the product performs a function under normal operating conditions without detailed measurement. <text:span text:style-name="T50">Used for qualitative or functional requirements and when precise measurement is not necessary.</text:span></text:p>
      <text:p text:style-name="P9"/>
      <text:p text:style-name="P12"><text:span text:style-name="T14">Examples: </text:span><text:span text:style-name="T49">p</text:span>owering on a device to show it boots, <text:span text:style-name="T49">d</text:span>emonstrating a mechanism opens/closes, <text:span text:style-name="T49">s</text:span>howing a user interface responds to input </text:p>
      <text:p text:style-name="P7"/>
      <text:p text:style-name="P9"><text:span text:style-name="T3">Inspection:</text:span><text:span text:style-name="T9"> </text:span>Verification by examining, measuring, or reviewing the physical item or documentation. <text:span text:style-name="T46">Inspection is used for simple, observable requirements. </text:span><text:span text:style-name="T56">Inspection does not require specialized measurement equipment or measurement while operating.</text:span></text:p>
      <text:p text:style-name="P9"/>
      <text:p text:style-name="P24">Examples: <text:span text:style-name="T47">existence o</text:span><text:span text:style-name="T48">f</text:span><text:span text:style-name="T47"> a feature, </text:span>dimensional inspection, visual inspection, reviewing drawings, BOMs, or documentation</text:p>
      <text:p text:style-name="P5"/>
      <text:p text:style-name="P9"><text:soft-page-break/><text:span text:style-name="T3">Test: </text:span>Verification by <text:span text:style-name="T57">collection and evaluation of quantitative performance, functional, or environmental data</text:span>. <text:span text:style-name="T58">Testing requires specialized instrumentation or equipment and </text:span><text:span text:style-name="T59">typically</text:span><text:span text:style-name="T58"> requires measurement during operation </text:span><text:span text:style-name="T60">or application of external stimuli</text:span><text:span text:style-name="T58">. </text:span><text:span text:style-name="T13">Used w</text:span>hen quantitative, measurable evidence is required <text:span text:style-name="T13">and w</text:span>hen regulatory standards require physical proof. </text:p>
      <text:p text:style-name="P9"/>
      <text:p text:style-name="P11"><text:span text:style-name="T12">Examples: </text:span><text:span text:style-name="T32">static l</text:span>oad testing, <text:span text:style-name="T32">e</text:span>nvironmental testing (thermal, vibration, <text:span text:style-name="T32">vacuum, </text:span>humidity), <text:span text:style-name="T32">e</text:span>lectrical performance testing</text:p>
      <text:p text:style-name="P6"/>
      <text:p text:style-name="P13"><text:span text:style-name="T7">(Qualification by) </text:span><text:span text:style-name="T4">Similarity: </text:span>Verification by showing that a requirement is met by <text:span text:style-name="T43">comparing to </text:span>a previously verified, equivalent design. <text:span text:style-name="T42">Verification by similarity is only applicable to qualification level requirements, not acceptance level (workmanship). </text:span><text:span text:style-name="T41">Verification by similarity must be used carefully with the following restrictions:</text:span></text:p>
      <text:list xml:id="list2735371257" text:style-name="L1">
        <text:list-item>
          <text:p text:style-name="P28">heritage unit was not verified by similarity or analysis</text:p>
        </text:list-item>
        <text:list-item>
          <text:p text:style-name="P28">heritage unit was flight quality</text:p>
        </text:list-item>
        <text:list-item>
          <text:p text:style-name="P28">heritage unit environments envelope those for the candidate</text:p>
        </text:list-item>
        <text:list-item>
          <text:p text:style-name="P28">relevant design features are identical</text:p>
        </text:list-item>
        <text:list-item>
          <text:p text:style-name="P28">heritage unit was successfully qualified without waivers</text:p>
        </text:list-item>
        <text:list-item>
          <text:p text:style-name="P28">heritage and candidate functions and operation are identical</text:p>
        </text:list-item>
        <text:list-item>
          <text:p text:style-name="P28">heritage unit life envelopes that for the candidate</text:p>
        </text:list-item>
        <text:list-item>
          <text:p text:style-name="P28">all documentation for the heritage unit is available</text:p>
        </text:list-item>
      </text:list>
      <text:p text:style-name="P25">Qual by similarity can reduce time and cost but requires strong justification and documentation.</text:p>
      <text:p text:style-name="P13"/>
      <text:p text:style-name="P14"><text:span text:style-name="T15">Examples: </text:span><text:span text:style-name="T33">r</text:span>eusing a previously qualified material or component, <text:span text:style-name="T33">l</text:span>everaging historical test data </text:p>
      <text:p text:style-name="P8"/>
      <text:p text:style-name="P8"><text:span text:style-name="T2">Lot Controls: </text:span><text:span text:style-name="T44">Verification by testing of samples from a well-controlled production process. </text:span><text:span text:style-name="T45">Some products cannot be tested without consumption of the product; for example: explosive devices. </text:span><text:span text:style-name="T51">The presumption is that the samples that are tested are representative of the rest of the delivered lot. Statistics can be used to bound the expected performance of the rest of the lot </text:span><text:span text:style-name="T53">based on the test data of the tested samples</text:span><text:span text:style-name="T51">. </text:span><text:span text:style-name="T52">The number of samples to be tested is determined by the size of the lot and level of desired reliability. </text:span><text:span text:style-name="T51">Non-destructive techniques can be used on the whole lot to detect defects that do not require consumption </text:span><text:span text:style-name="T54">and confirm the representative assumption</text:span><text:span text:style-name="T51">.</text:span></text:p>
      <text:p text:style-name="P8"/>
      <text:p text:style-name="P26">Examples: lot sample testing of explosive devices, <text:span text:style-name="T55">co-mixed and cured composite / epoxy samples subjected to tensile testing</text:span></text:p>
      <text:p text:style-name="P8"/>
      <text:p text:style-name="P17"><text:span text:style-name="T5">Design Verification Plan and Report (DVP&amp;R):</text:span><text:span text:style-name="T16"> A DVP&amp;R is a structured engineering document used to plan, execute, and record all verification activities required to prove that a design meets its specifications. </text:span>A typical DVP&amp;R includes:</text:p>
      <text:list xml:id="list1407733627" text:style-name="L2">
        <text:list-item>
          <text:p text:style-name="P34"><text:span text:style-name="Strong_20_Emphasis"><text:span text:style-name="T17">List of requirements</text:span></text:span><text:span text:style-name="T17"> to be verified </text:span></text:p>
        </text:list-item>
        <text:list-item>
          <text:p text:style-name="P34"><text:span text:style-name="Strong_20_Emphasis"><text:span text:style-name="T17">Verification method</text:span></text:span><text:span text:style-name="T17"> (analysis, test, inspection, demonstration, similarity, etc.) </text:span></text:p>
        </text:list-item>
        <text:list-item>
          <text:p text:style-name="P34"><text:span text:style-name="Strong_20_Emphasis"><text:span text:style-name="T17">Test conditions and procedures</text:span></text:span><text:span text:style-name="T17"> </text:span></text:p>
        </text:list-item>
        <text:list-item>
          <text:p text:style-name="P34"><text:span text:style-name="Strong_20_Emphasis"><text:span text:style-name="T17">Acceptance criteria</text:span></text:span><text:span text:style-name="T17"> </text:span></text:p>
        </text:list-item>
        <text:list-item>
          <text:p text:style-name="P34"><text:span text:style-name="Strong_20_Emphasis"><text:span text:style-name="T17">Responsibility and timing</text:span></text:span><text:span text:style-name="T17"> </text:span></text:p>
        </text:list-item>
        <text:list-item>
          <text:p text:style-name="P33"><text:span text:style-name="Strong_20_Emphasis"><text:span text:style-name="T17">Actual results</text:span></text:span><text:span text:style-name="T17"> and pass/fail status </text:span></text:p>
        </text:list-item>
      </text:list>
      <text:p text:style-name="P16">It combines two parts:</text:p>
      <text:list xml:id="list2647129592" text:style-name="L3">
        <text:list-item>
          <text:p text:style-name="P29">DVP — Design Verification Plan (the planned tests)</text:p>
        </text:list-item>
        <text:list-item>
          <text:p text:style-name="P29">DVR — Design Verification Report (the results<text:span text:style-name="T34">)</text:span></text:p>
        </text:list-item>
      </text:list>
      <text:p text:style-name="P15"><text:soft-page-break/></text:p>
      <text:p text:style-name="P15"/>
      <text:p text:style-name="P19"><text:span text:style-name="T2">Requirements Verification Matrix (RVM): </text:span><text:span text:style-name="T22">RVM is a table that </text:span><text:span text:style-name="T35">summarizes</text:span><text:span text:style-name="T22"> each requirement, the method(s) used to verify it, and the evidence that the requirement has been satisfied. The RVM shows how every requirement will be proven, by whom, when, and with what evidence. </text:span>It <text:span text:style-name="T36">helps </text:span>ensure complete <text:span text:style-name="T36">requirement </text:span>coverage, traceability, and accountability across the verification process. <text:span text:style-name="T23">The RVM is useful because it: </text:span></text:p>
      <text:list xml:id="list4042462078" text:style-name="L4">
        <text:list-item>
          <text:p text:style-name="P30">Ensures no requirement is left unverified</text:p>
        </text:list-item>
        <text:list-item>
          <text:p text:style-name="P31">Provides a single <text:span text:style-name="T37">reference</text:span> for design teams, test teams, and quality</text:p>
        </text:list-item>
        <text:list-item>
          <text:p text:style-name="P31">Supports audits, design reviews, and regulatory compliance</text:p>
        </text:list-item>
        <text:list-item>
          <text:p text:style-name="P31">Enables early detection of verification gaps or ambiguous requirement<text:span text:style-name="T37">s</text:span></text:p>
        </text:list-item>
      </text:list>
      <text:p text:style-name="P21">The RVM often contains: </text:p>
      <text:list xml:id="list2435154738" text:style-name="L5">
        <text:list-item>
          <text:p text:style-name="P32">Requirement identification <text:span text:style-name="T39">(ID)</text:span></text:p>
        </text:list-item>
        <text:list-item>
          <text:p text:style-name="P32">Requirement description <text:span text:style-name="T38">(text)</text:span></text:p>
        </text:list-item>
        <text:list-item>
          <text:p text:style-name="P32">Source / origin</text:p>
        </text:list-item>
        <text:list-item>
          <text:p text:style-name="P32">Verification method</text:p>
        </text:list-item>
        <text:list-item>
          <text:p text:style-name="P32">Acceptance criteria</text:p>
        </text:list-item>
        <text:list-item>
          <text:p text:style-name="P32">Link to verification activity details</text:p>
        </text:list-item>
        <text:list-item>
          <text:p text:style-name="P32">Responsibi<text:span text:style-name="T40">l</text:span>ity</text:p>
        </text:list-item>
        <text:list-item>
          <text:p text:style-name="P32">Timing</text:p>
        </text:list-item>
        <text:list-item>
          <text:p text:style-name="P32">High level results summary (pass/fail)</text:p>
        </text:list-item>
      </text:list>
      <text:p text:style-name="P18"/>
      <text:p text:style-name="P18"/>
      <text:p text:style-name="P4">References:</text:p>
      <text:p text:style-name="P20"/>
      <text:p text:style-name="P20"><text:span text:style-name="T61">[1] </text:span>SMC-S-016 Test Requirements for Launch, Upper-Stage and Space Vehicles, 2014.</text:p>
      <text:p text:style-name="P20"/>
      <text:p text:style-name="P27"><text:span text:style-name="T61">[2] </text:span>SMC Systems Engineering Primer &amp; Handbook, Space &amp; Missile Systems Center U.S. Air Force, 200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29T08:01:28.396000000</meta:creation-date>
    <dc:date>2025-12-30T13:10:46.795000000</dc:date>
    <meta:editing-duration>PT1H31M39S</meta:editing-duration>
    <meta:editing-cycles>85</meta:editing-cycles>
    <meta:generator>LibreOffice/7.1.4.2$Windows_X86_64 LibreOffice_project/a529a4fab45b75fefc5b6226684193eb000654f6</meta:generator>
    <meta:document-statistic meta:table-count="0" meta:image-count="0" meta:object-count="0" meta:page-count="3" meta:paragraph-count="55" meta:word-count="987" meta:character-count="7006" meta:non-whitespace-character-count="6090"/>
  </office:meta>
</office:document-meta>
</file>